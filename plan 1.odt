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50000028C100ABC8B.png"/>
  <manifest:file-entry manifest:media-type="image/png" manifest:full-path="Pictures/100002010000043A00000447EE511A8B.png"/>
  <manifest:file-entry manifest:media-type="image/png" manifest:full-path="Pictures/100002010000042A00000440AC6CE165.png"/>
  <manifest:file-entry manifest:media-type="image/png" manifest:full-path="Pictures/1000020100000345000003310453894B.png"/>
  <manifest:file-entry manifest:media-type="image/png" manifest:full-path="Pictures/10000201000001A900000138141D0CD6.png"/>
  <manifest:file-entry manifest:media-type="image/png" manifest:full-path="Pictures/10000201000001B1000001A4C9600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 style:list-style-name="L12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, baza danych kamieni</text:p>
      <text:p text:style-name="P2">Aleksander Grodner</text:p>
      <text:p text:style-name="P2">Damian Heichman</text:p>
      <text:p text:style-name="P5">Co robi?</text:p>
      <text:list xml:id="list7053071728630303788" text:style-name="L1">
        <text:list-item>
          <text:p text:style-name="P7">Dodawanie tras wraz z komentarzami i informacjami</text:p>
        </text:list-item>
        <text:list-item>
          <text:p text:style-name="P7">Stworzenie profilu, wyświetlającego (lub nie, w zależności od użytkownika) adekwatne dane</text:p>
        </text:list-item>
        <text:list-item>
          <text:p text:style-name="P7">tworzenie mapy dodanych lokalizacji</text:p>
        </text:list-item>
        <text:list-item>
          <text:p text:style-name="P7">znajdywanie najkrótszej trasy między lokalizacjami (planowanie kolejności tras np.danego dnia)</text:p>
        </text:list-item>
        <text:list-item>
          <text:p text:style-name="P7">filtrowanie tras na podstawie umiejętności użytkownika i dodanego sprzętu + typu uprawianej wspinaczki (asekuracja własna tzw. trad, użycie boltów, boulderowanie)</text:p>
        </text:list-item>
        <text:list-item>
          <text:p text:style-name="P7">funkcje sieciowe (korzystanie z tras dodanych przez innych użytkowników, wyświetlanie profili, status aktywności, dodawanie komentarzy do tras etc.)</text:p>
        </text:list-item>
      </text:list>
      <text:p text:style-name="P1"/>
      <text:p text:style-name="P3">Docelowe działanie poszczególnych obszarów</text:p>
      <text:p text:style-name="P1"/>
      <text:p text:style-name="P5">Profil</text:p>
      <text:p text:style-name="P1">Profil docelowo pozwala na wzajemne wyświetlanie wyników przez użytkowników (podobne do Stravy).</text:p>
      <text:list xml:id="list9205451179355794561" text:style-name="L2">
        <text:list-item>
          <text:p text:style-name="P8">Status aktywności, z możliwością ukrycia</text:p>
        </text:list-item>
        <text:list-item>
          <text:p text:style-name="P8">Życiówka</text:p>
        </text:list-item>
        <text:list-item>
          <text:p text:style-name="P8">Gotowe „flary” (typ uprawianej wspinaczki, umiejętności asekuracji, custom flary)</text:p>
        </text:list-item>
        <text:list-item>
          <text:p text:style-name="P8">zdjęcie/awatar</text:p>
        </text:list-item>
        <text:list-item>
          <text:p text:style-name="P8">Możliwość dodawania znajomych</text:p>
        </text:list-item>
      </text:list>
      <text:p text:style-name="P1"/>
      <text:p text:style-name="P5">Dodawanie tras</text:p>
      <text:p text:style-name="P6">Możliwość dodania tras do bazy danych, wraz z dodaniem zdjęcia i zaznaczeniem na nich kluczowych punktów. Dodawanie informacji takich jak:</text:p>
      <text:list xml:id="list5218931297883730223" text:style-name="L3">
        <text:list-item>
          <text:p text:style-name="P10">poziom trudności</text:p>
        </text:list-item>
        <text:list-item>
          <text:p text:style-name="P10">nazwa</text:p>
        </text:list-item>
        <text:list-item>
          <text:p text:style-name="P10">nachylenie</text:p>
        </text:list-item>
        <text:list-item>
          <text:p text:style-name="P10">komentarze własne</text:p>
        </text:list-item>
        <text:list-item>
          <text:p text:style-name="P10">wymagany sprzęt</text:p>
        </text:list-item>
      </text:list>
      <text:p text:style-name="P6"/>
      <text:p text:style-name="P5">Mapa</text:p>
      <text:p text:style-name="P6">Pojawią się na niej skały i grupy skał na których znajdują się trasy. Duża mapa, umożliwi znalezienie najkrótszej drogi między grupami skał, które dany użytkownik chce odwiedzić podczas wycieczki. Mała mapa pokaże wzajemne położenie skał w obrębie danej grupy.</text:p>
      <text:p text:style-name="P6"/>
      <text:p text:style-name="P6">Kolejność wykonania projektu</text:p>
      <text:p text:style-name="P6"/>
      <text:p text:style-name="P4">Etap pierwszy</text:p>
      <text:p text:style-name="P5">Profil</text:p>
      <text:list xml:id="list4361809381254957080" text:style-name="L4">
        <text:list-item>
          <text:p text:style-name="P11">wprowadzenie i edycja podstawowych informacji</text:p>
        </text:list-item>
      </text:list>
      <text:p text:style-name="P5">Trasa</text:p>
      <text:list xml:id="list2242245137765944866" text:style-name="L5">
        <text:list-item>
          <text:p text:style-name="P12">przesłanie zdjęcia</text:p>
        </text:list-item>
        <text:list-item>
          <text:p text:style-name="P12"><text:soft-page-break/>zaznaczenie punktów kluczowych</text:p>
        </text:list-item>
        <text:list-item>
          <text:p text:style-name="P12">dodanie podstawowych informacji</text:p>
        </text:list-item>
        <text:list-item>
          <text:p text:style-name="P12">dodanie trasy do skały</text:p>
        </text:list-item>
      </text:list>
      <text:p text:style-name="P5">Mapa</text:p>
      <text:list xml:id="list8242707537127624874" text:style-name="L6">
        <text:list-item>
          <text:p text:style-name="P13">koordynaty skał pokazane jako punkty na mapie</text:p>
        </text:list-item>
        <text:list-item>
          <text:p text:style-name="P13">strzałki pokazujące kierunek tras</text:p>
        </text:list-item>
      </text:list>
      <text:p text:style-name="P6"/>
      <text:p text:style-name="P6">Połączenie wszystkiego interfejsem</text:p>
      <text:p text:style-name="P6"/>
      <text:p text:style-name="P4">Etap drugi</text:p>
      <text:list xml:id="list3919181599910094864" text:style-name="L7">
        <text:list-item>
          <text:p text:style-name="P14">Wyszukiwarka tras z filtrami</text:p>
        </text:list-item>
      </text:list>
      <text:p text:style-name="P5">Profil</text:p>
      <text:list xml:id="list7838040667165735408" text:style-name="L8">
        <text:list-item>
          <text:p text:style-name="P15">posiadany sprzęt</text:p>
        </text:list-item>
      </text:list>
      <text:p text:style-name="P5">Trasa</text:p>
      <text:list xml:id="list4313273384616573283" text:style-name="L9">
        <text:list-item>
          <text:p text:style-name="P16">Wymagania sprzętowe (+ komunikat o braku wystarczającego sprzętu)</text:p>
        </text:list-item>
        <text:list-item>
          <text:p text:style-name="P16">Komentarze dotyczące trasy</text:p>
        </text:list-item>
      </text:list>
      <text:p text:style-name="P5">Mapa</text:p>
      <text:list xml:id="list5199410362750535185" text:style-name="L10">
        <text:list-item>
          <text:p text:style-name="P17">mała/duża mapa</text:p>
        </text:list-item>
        <text:list-item>
          <text:p text:style-name="P17">wyszukiwanie najkrótszej trasy</text:p>
        </text:list-item>
      </text:list>
      <text:p text:style-name="P6"/>
      <text:p text:style-name="P4">Etap trzeci (funkcje sieciowe)</text:p>
      <text:p text:style-name="P5">Profil</text:p>
      <text:list xml:id="list337375484178524701" text:style-name="L11">
        <text:list-item>
          <text:p text:style-name="P18">status aktywności</text:p>
        </text:list-item>
        <text:list-item>
          <text:p text:style-name="P18">możliwość pokazania/ukrycia informacji</text:p>
        </text:list-item>
        <text:list-item>
          <text:p text:style-name="P18">flary</text:p>
        </text:list-item>
        <text:list-item>
          <text:p text:style-name="P18">dodawanie znajomych</text:p>
        </text:list-item>
      </text:list>
      <text:p text:style-name="P5">Trasy</text:p>
      <text:list xml:id="list8663988914520616033" text:style-name="L12">
        <text:list-item>
          <text:p text:style-name="P19">dodawanie komentarzy do tras innych osób</text:p>
          <text:p text:style-name="P19"/>
        </text:list-item>
      </text:list>
      <text:p text:style-name="P4">Luźne pomysły</text:p>
      <text:list xml:id="list1676576407772240930" text:style-name="L13">
        <text:list-item>
          <text:p text:style-name="P20">wczytywanie tras z pliku</text:p>
        </text:list-item>
        <text:list-item>
          <text:p text:style-name="P20">zapisywanie tras offline/łączenie baz danych</text:p>
        </text:list-item>
        <text:list-item>
          <text:p text:style-name="P20">powiadomienia (np. możliwość pogratulowania komuś po zrobieniu życiówki)</text:p>
        </text:list-item>
        <text:list-item>
          <text:p text:style-name="P20">kalkulator sumujący sprzęt, filtrowanie na podstawie połączonego sprzętu kilku użytkowników</text:p>
        </text:list-item>
        <text:list-item>
          <text:p text:style-name="P20">okresy godowe ptaków i inne utrudnienia</text:p>
        </text:list-item>
        <text:list-item>
          <text:p text:style-name="P20">notatnik</text:p>
        </text:list-item>
        <text:list-item>
          <text:p text:style-name="P20">dodawanie szlaków</text:p>
        </text:list-item>
        <text:list-item>
          <text:p text:style-name="P20">generowanie tras łączących inne trasy, jeżeli pozwala na to odległość zabezpieczeń i ich kąt<text:line-break/></text:p>
        </text:list-item>
      </text:list>
      <text:p text:style-name="P6">GUI</text:p>
      <text:p text:style-name="P6"><draw:frame draw:style-name="fr1" draw:name="grafika1" text:anchor-type="paragraph" svg:width="9.165cm" svg:height="8.89cm" draw:z-index="0"><draw:image xlink:href="Pictures/10000201000001B1000001A4C9600EF1.png" xlink:type="simple" xlink:show="embed" xlink:actuate="onLoad"/></draw:frame><text:soft-page-break/>lista skał</text:p>
      <text:p text:style-name="P6"/>
      <text:p text:style-name="P6"><draw:frame draw:style-name="fr2" draw:name="grafika2" text:anchor-type="paragraph" svg:width="15.685cm" svg:height="13.801cm" draw:z-index="1"><draw:image xlink:href="Pictures/10000201000002E50000028C100ABC8B.png" xlink:type="simple" xlink:show="embed" xlink:actuate="onLoad"/></draw:frame><text:line-break/></text:p>
      <text:p text:style-name="P6">mapa</text:p>
      <text:p text:style-name="P6"><draw:frame draw:style-name="fr2" draw:name="grafika3" text:anchor-type="paragraph" svg:width="8.996cm" svg:height="6.604cm" draw:z-index="2"><draw:image xlink:href="Pictures/10000201000001A900000138141D0CD6.png" xlink:type="simple" xlink:show="embed" xlink:actuate="onLoad"/></draw:frame><text:soft-page-break/></text:p>
      <text:p text:style-name="P6"/>
      <text:p text:style-name="P6">menu główne</text:p>
      <text:p text:style-name="P6"/>
      <text:p text:style-name="P6"><draw:frame draw:style-name="fr4" draw:name="grafika6" text:anchor-type="paragraph" svg:x="0.471cm" svg:y="0.219cm" svg:width="17cm" svg:height="16.591cm" draw:z-index="5"><draw:image xlink:href="Pictures/1000020100000345000003310453894B.png" xlink:type="simple" xlink:show="embed" xlink:actuate="onLoad"/></draw:frame></text:p>
      <text:p text:style-name="P6"/>
      <text:p text:style-name="P6"><text:soft-page-break/></text:p>
      <text:p text:style-name="P6"><draw:frame draw:style-name="fr3" draw:name="grafika4" text:anchor-type="paragraph" svg:width="17cm" svg:height="17.35cm" draw:z-index="3"><draw:image xlink:href="Pictures/100002010000042A00000440AC6CE165.png" xlink:type="simple" xlink:show="embed" xlink:actuate="onLoad"/></draw:frame><draw:frame draw:style-name="fr3" draw:name="grafika5" text:anchor-type="paragraph" svg:width="17cm" svg:height="17.203cm" draw:z-index="4"><draw:image xlink:href="Pictures/100002010000043A00000447EE511A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er Grodner</meta:initial-creator>
    <meta:creation-date>2026-05-05T12:35:00.94</meta:creation-date>
    <dc:date>2026-05-14T12:43:47.98</dc:date>
    <dc:creator>Aleksander Grodner</dc:creator>
    <meta:editing-duration>PT44M18S</meta:editing-duration>
    <meta:editing-cycles>4</meta:editing-cycles>
    <meta:generator>OpenOffice/4.1.16$Win32 OpenOffice.org_project/4116m3$Build-9816</meta:generator>
    <meta:document-statistic meta:table-count="0" meta:image-count="6" meta:object-count="0" meta:page-count="5" meta:paragraph-count="72" meta:word-count="372" meta:character-count="2591"/>
  </office:meta>
</office:document-meta>
</file>