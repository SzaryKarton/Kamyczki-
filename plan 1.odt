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50000028C100ABC8B.png"/>
  <manifest:file-entry manifest:media-type="image/png" manifest:full-path="Pictures/100002010000043A00000447EE511A8B.png"/>
  <manifest:file-entry manifest:media-type="image/png" manifest:full-path="Pictures/100002010000042A00000440AC6CE165.png"/>
  <manifest:file-entry manifest:media-type="image/png" manifest:full-path="Pictures/1000020100000345000003310453894B.png"/>
  <manifest:file-entry manifest:media-type="image/png" manifest:full-path="Pictures/10000201000001A900000138141D0CD6.png"/>
  <manifest:file-entry manifest:media-type="image/png" manifest:full-path="Pictures/10000201000001B1000001A4C9600E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3pt" style:font-size-asian="13pt" style:font-size-complex="13pt"/>
    </style:style>
    <style:style style:name="P2" style:family="paragraph" style:parent-style-name="Standard">
      <style:paragraph-properties fo:text-align="center" style:justify-single-word="false"/>
      <style:text-properties fo:font-size="13pt" style:text-underline-style="solid" style:text-underline-width="auto" style:text-underline-color="font-color" style:font-size-asian="13pt" style:font-size-complex="13pt"/>
    </style:style>
    <style:style style:name="P3" style:family="paragraph" style:parent-style-name="Standard">
      <style:paragraph-properties fo:text-align="start" style:justify-single-word="false"/>
      <style:text-properties fo:font-size="13pt" style:text-underline-style="solid" style:text-underline-width="auto" style:text-underline-color="font-color" style:font-size-asian="13pt" style:font-size-complex="13pt"/>
    </style:style>
    <style:style style:name="P4" style:family="paragraph" style:parent-style-name="Standard">
      <style:paragraph-properties fo:text-align="start"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5"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6"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7" style:family="paragraph" style:parent-style-name="Standard" style:list-style-name="L1">
      <style:paragraph-properties fo:text-align="start" style:justify-single-word="false"/>
      <style:text-properties fo:font-size="13pt" style:font-size-asian="13pt" style:font-size-complex="13pt"/>
    </style:style>
    <style:style style:name="P8" style:family="paragraph" style:parent-style-name="Standard" style:list-style-name="L2">
      <style:paragraph-properties fo:text-align="start" style:justify-single-word="false"/>
      <style:text-properties fo:font-size="13pt" style:font-size-asian="13pt" style:font-size-complex="13pt"/>
    </style:style>
    <style:style style:name="P9"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10" style:family="paragraph" style:parent-style-name="Standard" style:list-style-name="L3">
      <style:paragraph-properties fo:text-align="start" style:justify-single-word="false"/>
      <style:text-properties fo:font-size="13pt" fo:font-weight="normal" style:font-size-asian="13pt" style:font-weight-asian="normal" style:font-size-complex="13pt" style:font-weight-complex="normal"/>
    </style:style>
    <style:style style:name="P11" style:family="paragraph" style:parent-style-name="Standard" style:list-style-name="L4">
      <style:paragraph-properties fo:text-align="start" style:justify-single-word="false"/>
      <style:text-properties fo:font-size="13pt" fo:font-weight="normal" style:font-size-asian="13pt" style:font-weight-asian="normal" style:font-size-complex="13pt" style:font-weight-complex="normal"/>
    </style:style>
    <style:style style:name="P12" style:family="paragraph" style:parent-style-name="Standard" style:list-style-name="L5">
      <style:paragraph-properties fo:text-align="start" style:justify-single-word="false"/>
      <style:text-properties fo:font-size="13pt" fo:font-weight="normal" style:font-size-asian="13pt" style:font-weight-asian="normal" style:font-size-complex="13pt" style:font-weight-complex="normal"/>
    </style:style>
    <style:style style:name="P13" style:family="paragraph" style:parent-style-name="Standard" style:list-style-name="L6">
      <style:paragraph-properties fo:text-align="start" style:justify-single-word="false"/>
      <style:text-properties fo:font-size="13pt" fo:font-weight="normal" style:font-size-asian="13pt" style:font-weight-asian="normal" style:font-size-complex="13pt" style:font-weight-complex="normal"/>
    </style:style>
    <style:style style:name="P14" style:family="paragraph" style:parent-style-name="Standard" style:list-style-name="L7">
      <style:paragraph-properties fo:text-align="start" style:justify-single-word="false"/>
      <style:text-properties fo:font-size="13pt" fo:font-weight="normal" style:font-size-asian="13pt" style:font-weight-asian="normal" style:font-size-complex="13pt" style:font-weight-complex="normal"/>
    </style:style>
    <style:style style:name="P15" style:family="paragraph" style:parent-style-name="Standard" style:list-style-name="L8">
      <style:paragraph-properties fo:text-align="start" style:justify-single-word="false"/>
      <style:text-properties fo:font-size="13pt" fo:font-weight="normal" style:font-size-asian="13pt" style:font-weight-asian="normal" style:font-size-complex="13pt" style:font-weight-complex="normal"/>
    </style:style>
    <style:style style:name="P16" style:family="paragraph" style:parent-style-name="Standard" style:list-style-name="L9">
      <style:paragraph-properties fo:text-align="start" style:justify-single-word="false"/>
      <style:text-properties fo:font-size="13pt" fo:font-weight="normal" style:font-size-asian="13pt" style:font-weight-asian="normal" style:font-size-complex="13pt" style:font-weight-complex="normal"/>
    </style:style>
    <style:style style:name="P17" style:family="paragraph" style:parent-style-name="Standard" style:list-style-name="L10">
      <style:paragraph-properties fo:text-align="start" style:justify-single-word="false"/>
      <style:text-properties fo:font-size="13pt" fo:font-weight="normal" style:font-size-asian="13pt" style:font-weight-asian="normal" style:font-size-complex="13pt" style:font-weight-complex="normal"/>
    </style:style>
    <style:style style:name="P18" style:family="paragraph" style:parent-style-name="Standard" style:list-style-name="L11">
      <style:paragraph-properties fo:text-align="start" style:justify-single-word="false"/>
      <style:text-properties fo:font-size="13pt" fo:font-weight="normal" style:font-size-asian="13pt" style:font-weight-asian="normal" style:font-size-complex="13pt" style:font-weight-complex="normal"/>
    </style:style>
    <style:style style:name="P19" style:family="paragraph" style:parent-style-name="Standard" style:list-style-name="L12">
      <style:paragraph-properties fo:text-align="start" style:justify-single-word="false"/>
      <style:text-properties fo:font-size="13pt" fo:font-weight="normal" style:font-size-asian="13pt" style:font-weight-asian="normal" style:font-size-complex="13pt" style:font-weight-complex="normal"/>
    </style:style>
    <style:style style:name="P20" style:family="paragraph" style:parent-style-name="Standard" style:list-style-name="L13">
      <style:paragraph-properties fo:text-align="start" style:justify-single-word="false"/>
      <style:text-properties fo:font-size="13pt" fo:font-weight="normal"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kt, baza danych kamieni</text:p>
      <text:p text:style-name="P2">Aleksander Grodner</text:p>
      <text:p text:style-name="P2">Damian Heichman</text:p>
      <text:p text:style-name="P5">Co robi?</text:p>
      <text:list xml:id="list247245509257576613" text:style-name="L1">
        <text:list-item>
          <text:p text:style-name="P7">Dodawanie tras wraz z komentarzami i informacjami</text:p>
        </text:list-item>
        <text:list-item>
          <text:p text:style-name="P7">Stworzenie profilu, wyświetlającego (lub nie, w zależności od użytkownika) adekwatne dane</text:p>
        </text:list-item>
        <text:list-item>
          <text:p text:style-name="P7">tworzenie mapy dodanych lokalizacji</text:p>
        </text:list-item>
        <text:list-item>
          <text:p text:style-name="P7">znajdywanie najkrótszej trasy między lokalizacjami (planowanie kolejności tras np.danego dnia)</text:p>
        </text:list-item>
        <text:list-item>
          <text:p text:style-name="P7">filtrowanie tras na podstawie umiejętności użytkownika i dodanego sprzętu + typu uprawianej wspinaczki (asekuracja własna tzw. trad, użycie boltów, boulderowanie)</text:p>
        </text:list-item>
        <text:list-item>
          <text:p text:style-name="P7">funkcje sieciowe (korzystanie z tras dodanych przez innych użytkowników, wyświetlanie profili, status aktywności, dodawanie komentarzy do tras etc.)</text:p>
        </text:list-item>
      </text:list>
      <text:p text:style-name="P1"/>
      <text:p text:style-name="P3">Docelowe działanie poszczególnych obszarów</text:p>
      <text:p text:style-name="P1"/>
      <text:p text:style-name="P5">Profil</text:p>
      <text:p text:style-name="P1">Profil docelowo pozwala na wzajemne wyświetlanie wyników przez użytkowników (podobne do Stravy).</text:p>
      <text:list xml:id="list665190471774277684" text:style-name="L2">
        <text:list-item>
          <text:p text:style-name="P8">Status aktywności, z możliwością ukrycia</text:p>
        </text:list-item>
        <text:list-item>
          <text:p text:style-name="P8">Życiówka</text:p>
        </text:list-item>
        <text:list-item>
          <text:p text:style-name="P8">Gotowe „flary” (typ uprawianej wspinaczki, umiejętności asekuracji, custom flary)</text:p>
        </text:list-item>
        <text:list-item>
          <text:p text:style-name="P8">zdjęcie/awatar</text:p>
        </text:list-item>
        <text:list-item>
          <text:p text:style-name="P8">Możliwość dodawania znajomych</text:p>
        </text:list-item>
      </text:list>
      <text:p text:style-name="P1"/>
      <text:p text:style-name="P5">Dodawanie tras</text:p>
      <text:p text:style-name="P6">Możliwość dodania tras do bazy danych, wraz z dodaniem zdjęcia i zaznaczeniem na nich kluczowych punktów. Dodawanie informacji takich jak:</text:p>
      <text:list xml:id="list6954252182888541831" text:style-name="L3">
        <text:list-item>
          <text:p text:style-name="P10">poziom trudności</text:p>
        </text:list-item>
        <text:list-item>
          <text:p text:style-name="P10">nazwa</text:p>
        </text:list-item>
        <text:list-item>
          <text:p text:style-name="P10">nachylenie</text:p>
        </text:list-item>
        <text:list-item>
          <text:p text:style-name="P10">komentarze własne</text:p>
        </text:list-item>
        <text:list-item>
          <text:p text:style-name="P10">wymagany sprzęt</text:p>
        </text:list-item>
      </text:list>
      <text:p text:style-name="P6"/>
      <text:p text:style-name="P5">Mapa</text:p>
      <text:p text:style-name="P6">Pojawią się na niej skały i grupy skał na których znajdują się trasy. Duża mapa, umożliwi znalezienie najkrótszej drogi między grupami skał, które dany użytkownik chce odwiedzić podczas wycieczki. Mała mapa pokaże wzajemne położenie skał w obrębie danej grupy.</text:p>
      <text:p text:style-name="P6"/>
      <text:p text:style-name="P5">Klasy i rozwiązania programistyczne</text:p>
      <text:p text:style-name="P5">Skała</text:p>
      <text:p text:style-name="P6">Klasa zawierająca dane o skalce, Qlistę z trasami oraz metody je tworzące*/usuwające.</text:p>
      <text:p text:style-name="P6"/>
      <text:p text:style-name="P6">*tworzenie polega na wgraniu od użytkownika zdjęcia i wykrywaniu wciśnięć myszką, które tworzą qgraphicsitemy będące punktami kluczowymi trasy, potem łączą je.</text:p>
      <text:p text:style-name="P6"/>
      <text:p text:style-name="P5"><text:soft-page-break/>Znalezienie najkrótszej drogi</text:p>
      <text:p text:style-name="P6">za pomocą algorytmu typu „najbliższy sąsiad” </text:p>
      <text:p text:style-name="P5">Katalog skałek</text:p>
      <text:p text:style-name="P5"><text:span text:style-name="T1">klasa zawierająca Qlist z obiektami klasy skałki. Pozwala na dodawanie, usuwanie, filtrowanie po poziomie trudności. Łączyłaby je również z guzikami na mapie.</text:span></text:p>
      <text:p text:style-name="P5">Mapa</text:p>
      <text:p text:style-name="P6">Miałaby układ współrzędnych reprezentujący współrzędne geograficzne w określonym zakresie (z góry ustalonym, lub wybranym przez użytkownika). Według tych współrzędnych pojawiałyby się na niej symbole skałek, będące guzikami przenoszącymi do ich stron. Pojawiałyby się one podczas tworzenia (dodawania) nowej skałki.</text:p>
      <text:p text:style-name="P5"/>
      <text:p text:style-name="P6">Kolejność wykonania projektu</text:p>
      <text:p text:style-name="P6"/>
      <text:p text:style-name="P4">Etap pierwszy</text:p>
      <text:p text:style-name="P5">Profil</text:p>
      <text:list xml:id="list6494933360374351331" text:style-name="L4">
        <text:list-item>
          <text:p text:style-name="P11">wprowadzenie i edycja podstawowych informacji</text:p>
        </text:list-item>
      </text:list>
      <text:p text:style-name="P5">Trasa</text:p>
      <text:list xml:id="list3736868159814535086" text:style-name="L5">
        <text:list-item>
          <text:p text:style-name="P12">przesłanie zdjęcia</text:p>
        </text:list-item>
        <text:list-item>
          <text:p text:style-name="P12">zaznaczenie punktów kluczowych</text:p>
        </text:list-item>
        <text:list-item>
          <text:p text:style-name="P12">dodanie podstawowych informacji</text:p>
        </text:list-item>
        <text:list-item>
          <text:p text:style-name="P12">dodanie trasy do skały</text:p>
        </text:list-item>
      </text:list>
      <text:p text:style-name="P5">Mapa</text:p>
      <text:list xml:id="list949882666181786135" text:style-name="L6">
        <text:list-item>
          <text:p text:style-name="P13">koordynaty skał pokazane jako punkty na mapie</text:p>
        </text:list-item>
        <text:list-item>
          <text:p text:style-name="P13">strzałki pokazujące kierunek tras</text:p>
        </text:list-item>
      </text:list>
      <text:p text:style-name="P6"/>
      <text:p text:style-name="P6">Połączenie wszystkiego interfejsem</text:p>
      <text:p text:style-name="P6"/>
      <text:p text:style-name="P4">Etap drugi</text:p>
      <text:list xml:id="list3137392125237772494" text:style-name="L7">
        <text:list-item>
          <text:p text:style-name="P14">Wyszukiwarka tras z filtrami</text:p>
        </text:list-item>
      </text:list>
      <text:p text:style-name="P5">Profil</text:p>
      <text:list xml:id="list8532959642045281211" text:style-name="L8">
        <text:list-item>
          <text:p text:style-name="P15">posiadany sprzęt</text:p>
        </text:list-item>
      </text:list>
      <text:p text:style-name="P5">Trasa</text:p>
      <text:list xml:id="list8489118190398765423" text:style-name="L9">
        <text:list-item>
          <text:p text:style-name="P16">Wymagania sprzętowe (+ komunikat o braku wystarczającego sprzętu)</text:p>
        </text:list-item>
        <text:list-item>
          <text:p text:style-name="P16">Komentarze dotyczące trasy</text:p>
        </text:list-item>
      </text:list>
      <text:p text:style-name="P5">Mapa</text:p>
      <text:list xml:id="list2207415389405152467" text:style-name="L10">
        <text:list-item>
          <text:p text:style-name="P17">mała/duża mapa</text:p>
        </text:list-item>
        <text:list-item>
          <text:p text:style-name="P17">wyszukiwanie najkrótszej trasy</text:p>
        </text:list-item>
      </text:list>
      <text:p text:style-name="P6"/>
      <text:p text:style-name="P4">Etap trzeci (funkcje sieciowe)</text:p>
      <text:p text:style-name="P5">Profil</text:p>
      <text:list xml:id="list1241977748021785253" text:style-name="L11">
        <text:list-item>
          <text:p text:style-name="P18">status aktywności</text:p>
        </text:list-item>
        <text:list-item>
          <text:p text:style-name="P18">możliwość pokazania/ukrycia informacji</text:p>
        </text:list-item>
        <text:list-item>
          <text:p text:style-name="P18">flary</text:p>
        </text:list-item>
        <text:list-item>
          <text:p text:style-name="P18">dodawanie znajomych</text:p>
        </text:list-item>
      </text:list>
      <text:p text:style-name="P5">Trasy</text:p>
      <text:list xml:id="list1593632236764324730" text:style-name="L12">
        <text:list-item>
          <text:p text:style-name="P19">dodawanie komentarzy do tras innych osób</text:p>
          <text:p text:style-name="P19"/>
        </text:list-item>
      </text:list>
      <text:p text:style-name="P4"><text:soft-page-break/>Luźne pomysły</text:p>
      <text:list xml:id="list6943722285961562793" text:style-name="L13">
        <text:list-item>
          <text:p text:style-name="P20">wczytywanie tras z pliku</text:p>
        </text:list-item>
        <text:list-item>
          <text:p text:style-name="P20">zapisywanie tras offline/łączenie baz danych</text:p>
        </text:list-item>
        <text:list-item>
          <text:p text:style-name="P20">powiadomienia (np. możliwość pogratulowania komuś po zrobieniu życiówki)</text:p>
        </text:list-item>
        <text:list-item>
          <text:p text:style-name="P20">kalkulator sumujący sprzęt, filtrowanie na podstawie połączonego sprzętu kilku użytkowników</text:p>
        </text:list-item>
        <text:list-item>
          <text:p text:style-name="P20">okresy godowe ptaków i inne utrudnienia</text:p>
        </text:list-item>
        <text:list-item>
          <text:p text:style-name="P20">notatnik</text:p>
        </text:list-item>
        <text:list-item>
          <text:p text:style-name="P20">dodawanie szlaków</text:p>
        </text:list-item>
        <text:list-item>
          <text:p text:style-name="P20">generowanie tras łączących inne trasy, jeżeli pozwala na to odległość zabezpieczeń i ich kąt<text:line-break/></text:p>
        </text:list-item>
      </text:list>
      <text:p text:style-name="P6">GUI</text:p>
      <text:p text:style-name="P6"><draw:frame draw:style-name="fr1" draw:name="grafika1" text:anchor-type="paragraph" svg:width="9.165cm" svg:height="8.89cm" draw:z-index="0"><draw:image xlink:href="Pictures/10000201000001B1000001A4C9600EF1.png" xlink:type="simple" xlink:show="embed" xlink:actuate="onLoad"/></draw:frame>lista skał</text:p>
      <text:p text:style-name="P6"/>
      <text:p text:style-name="P6"><draw:frame draw:style-name="fr1" draw:name="grafika2" text:anchor-type="paragraph" svg:width="15.685cm" svg:height="13.801cm" draw:z-index="1"><draw:image xlink:href="Pictures/10000201000002E50000028C100ABC8B.png" xlink:type="simple" xlink:show="embed" xlink:actuate="onLoad"/></draw:frame><text:soft-page-break/><text:line-break/></text:p>
      <text:p text:style-name="P6">mapa</text:p>
      <text:p text:style-name="P6"><draw:frame draw:style-name="fr2" draw:name="grafika3" text:anchor-type="paragraph" svg:width="8.996cm" svg:height="6.604cm" draw:z-index="2"><draw:image xlink:href="Pictures/10000201000001A900000138141D0CD6.png" xlink:type="simple" xlink:show="embed" xlink:actuate="onLoad"/></draw:frame></text:p>
      <text:p text:style-name="P6"/>
      <text:p text:style-name="P6">menu główne</text:p>
      <text:p text:style-name="P6"/>
      <text:p text:style-name="P6"><draw:frame draw:style-name="fr3" draw:name="grafika6" text:anchor-type="paragraph" svg:x="0.471cm" svg:y="0.219cm" svg:width="17cm" svg:height="16.591cm" draw:z-index="5"><draw:image xlink:href="Pictures/1000020100000345000003310453894B.png" xlink:type="simple" xlink:show="embed" xlink:actuate="onLoad"/></draw:frame><text:soft-page-break/></text:p>
      <text:p text:style-name="P6"/>
      <text:p text:style-name="P6"/>
      <text:p text:style-name="P6"><draw:frame draw:style-name="fr4" draw:name="grafika4" text:anchor-type="paragraph" svg:width="17cm" svg:height="17.35cm" draw:z-index="3"><draw:image xlink:href="Pictures/100002010000042A00000440AC6CE165.png" xlink:type="simple" xlink:show="embed" xlink:actuate="onLoad"/></draw:frame><draw:frame draw:style-name="fr5" draw:name="grafika5" text:anchor-type="paragraph" svg:width="17cm" svg:height="17.203cm" draw:z-index="4"><draw:image xlink:href="Pictures/100002010000043A00000447EE511A8B.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ksander Grodner</meta:initial-creator>
    <meta:creation-date>2026-05-05T12:35:00.94</meta:creation-date>
    <dc:date>2026-05-14T19:32:27.32</dc:date>
    <dc:creator>Aleksander Grodner</dc:creator>
    <meta:editing-duration>PT1H19M5S</meta:editing-duration>
    <meta:editing-cycles>5</meta:editing-cycles>
    <meta:generator>OpenOffice/4.1.16$Win32 OpenOffice.org_project/4116m3$Build-9816</meta:generator>
    <meta:document-statistic meta:table-count="0" meta:image-count="6" meta:object-count="0" meta:page-count="6" meta:paragraph-count="82" meta:word-count="483" meta:character-count="3440"/>
  </office:meta>
</office:document-meta>
</file>